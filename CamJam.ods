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ID</text:p>
          </table:table-cell>
          <table:table-cell office:value-type="string" calcext:value-type="string">
            <text:p>Iast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021000" calcext:value-type="float">
            <text:p>14021000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aker</text:p>
          </table:table-cell>
          <table:table-cell office:value-type="string" calcext:value-type="string">
            <text:p><text:a xlink:href="mailto:alister.ware@ntlworld.com" xlink:type="simple">alister.ware@ntlworld.com</text:a></text:p>
          </table:table-cell>
          <table:table-cell/>
        </table:table-row>
        <table:table-row table:style-name="ro1">
          <table:table-cell office:value-type="float" office:value="14021001" calcext:value-type="float">
            <text:p>1402100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f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iser</text:p>
          </table:table-cell>
          <table:table-cell office:value-type="string" calcext:value-type="string">
            <text:p><text:a xlink:href="mailto:brian@camjam.com" xlink:type="simple">brian@camjam.com</text:a></text:p>
          </table:table-cell>
          <table:table-cell/>
        </table:table-row>
        <table:table-row table:style-name="ro1">
          <table:table-cell office:value-type="float" office:value="14021002" calcext:value-type="float">
            <text:p>1402100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ret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aker</text:p>
          </table:table-cell>
          <table:table-cell office:value-type="string" calcext:value-type="string">
            <text:p>paul@footlegrobotics.com</text:p>
          </table:table-cell>
          <table:table-cell/>
        </table:table-row>
        <table:table-row table:style-name="ro1">
          <table:table-cell office:value-type="float" office:value="14021003" calcext:value-type="float">
            <text:p>14021003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k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<text:a xlink:href="mailto:jskywalker@rebel.hq" xlink:type="simple">jskywalker@rebel.hq</text:a></text:p>
          </table:table-cell>
          <table:table-cell/>
        </table:table-row>
        <table:table-row table:style-name="ro1">
          <table:table-cell office:value-type="float" office:value="14021004" calcext:value-type="float">
            <text:p>14021004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Moof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5" calcext:value-type="float">
            <text:p>14021005</text:p>
          </table:table-cell>
          <table:table-cell office:value-type="string" calcext:value-type="string">
            <text:p><text:span text:style-name="T1">B</text:span>owser</text:p>
          </table:table-cell>
          <table:table-cell office:value-type="string" calcext:value-type="string">
            <text:p>Sava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6" calcext:value-type="float">
            <text:p>14021006</text:p>
          </table:table-cell>
          <table:table-cell office:value-type="string" calcext:value-type="string">
            <text:p>qravar</text:p>
          </table:table-cell>
          <table:table-cell office:value-type="string" calcext:value-type="string">
            <text:p>g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7" calcext:value-type="float">
            <text:p>14021007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G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08" calcext:value-type="float">
            <text:p>14021008</text:p>
          </table:table-cell>
          <table:table-cell office:value-type="string" calcext:value-type="string">
            <text:p>TitTin</text:p>
          </table:table-cell>
          <table:table-cell office:value-type="string" calcext:value-type="string">
            <text:p>G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09" calcext:value-type="float">
            <text:p>14021009</text:p>
          </table:table-cell>
          <table:table-cell office:value-type="string" calcext:value-type="string">
            <text:p>Brage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0" calcext:value-type="float">
            <text:p>14021010</text:p>
          </table:table-cell>
          <table:table-cell office:value-type="string" calcext:value-type="string">
            <text:p>Braggi</text:p>
          </table:table-cell>
          <table:table-cell office:value-type="string" calcext:value-type="string">
            <text:p>Nutrid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1" calcext:value-type="float">
            <text:p>14021011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2" calcext:value-type="float">
            <text:p>14021012</text:p>
          </table:table-cell>
          <table:table-cell office:value-type="string" calcext:value-type="string">
            <text:p>Shreck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3" calcext:value-type="float">
            <text:p>14021013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y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4" calcext:value-type="float">
            <text:p>14021014</text:p>
          </table:table-cell>
          <table:table-cell office:value-type="string" calcext:value-type="string">
            <text:p>trym</text:p>
          </table:table-cell>
          <table:table-cell office:value-type="string" calcext:value-type="string">
            <text:p>S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5" calcext:value-type="float">
            <text:p>14021015</text:p>
          </table:table-cell>
          <table:table-cell office:value-type="string" calcext:value-type="string">
            <text:p>Bragi</text:p>
          </table:table-cell>
          <table:table-cell office:value-type="string" calcext:value-type="string">
            <text:p>Sky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6" calcext:value-type="float">
            <text:p>14021016</text:p>
          </table:table-cell>
          <table:table-cell office:value-type="string" calcext:value-type="string">
            <text:p>Vidar</text:p>
          </table:table-cell>
          <table:table-cell office:value-type="string" calcext:value-type="string">
            <text:p>M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float" office:value="14021017" calcext:value-type="float">
            <text:p>14021017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od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8" calcext:value-type="float">
            <text:p>14021018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Flins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19" calcext:value-type="float">
            <text:p>14021019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R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20" calcext:value-type="float">
            <text:p>14021020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21" calcext:value-type="float">
            <text:p>14021021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22" calcext:value-type="float">
            <text:p>14021022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23" calcext:value-type="float">
            <text:p>14021023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  <table:table-row table:style-name="ro1">
          <table:table-cell office:value-type="float" office:value="14021024" calcext:value-type="float">
            <text:p>14021024</text:p>
          </table:table-cell>
          <table:table-cell office:value-type="string" calcext:value-type="string">
            <text:p>Sp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3:07:11.509115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2:42:42.517942520</meta:creation-date>
    <dc:date>2026-03-08T13:22:27.907042745</dc:date>
    <meta:editing-duration>PT32M19S</meta:editing-duration>
    <meta:editing-cycles>2</meta:editing-cycles>
    <meta:generator>LibreOffice/25.2.3.2$Linux_AARCH64 LibreOffice_project/520$Build-2</meta:generator>
    <meta:document-statistic meta:table-count="1" meta:cell-count="131" meta:object-count="0"/>
  </office:meta>
</office:document-meta>
</file>